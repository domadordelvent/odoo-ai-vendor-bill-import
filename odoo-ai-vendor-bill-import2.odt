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ula1" style:family="table">
      <style:table-properties style:width="12.663cm" table:align="left"/>
    </style:style>
    <style:style style:name="Taula1.A" style:family="table-column">
      <style:table-column-properties style:column-width="1.367cm"/>
    </style:style>
    <style:style style:name="Taula1.B" style:family="table-column">
      <style:table-column-properties style:column-width="9.29cm"/>
    </style:style>
    <style:style style:name="Taula1.C" style:family="table-column">
      <style:table-column-properties style:column-width="2.006cm"/>
    </style:style>
    <style:style style:name="Taula1.A1" style:family="table-cell">
      <style:table-cell-properties style:vertical-align="middle" fo:padding="0.049cm" fo:border="none"/>
    </style:style>
    <style:style style:name="P1" style:family="paragraph" style:parent-style-name="Heading_20_2">
      <style:text-properties fo:font-size="8pt" officeooo:rsid="00068aa6" officeooo:paragraph-rsid="000f9594" style:font-size-asian="8pt" style:font-size-complex="8pt"/>
    </style:style>
    <style:style style:name="P2" style:family="paragraph" style:parent-style-name="Heading_20_2">
      <style:text-properties fo:font-size="8pt" officeooo:paragraph-rsid="000f9594" style:font-size-asian="8pt" style:font-size-complex="8pt"/>
    </style:style>
    <style:style style:name="P3" style:family="paragraph" style:parent-style-name="Heading_20_2">
      <style:text-properties officeooo:paragraph-rsid="000f9594"/>
    </style:style>
    <style:style style:name="P4" style:family="paragraph" style:parent-style-name="Heading_20_3">
      <style:text-properties fo:font-size="8pt" officeooo:paragraph-rsid="000f9594" style:font-size-asian="8pt" style:font-size-complex="8pt"/>
    </style:style>
    <style:style style:name="P5" style:family="paragraph" style:parent-style-name="Heading_20_3">
      <style:text-properties fo:font-size="8pt" officeooo:rsid="00068aa6" officeooo:paragraph-rsid="000f9594" style:font-size-asian="8pt" style:font-size-complex="8pt"/>
    </style:style>
    <style:style style:name="P6" style:family="paragraph" style:parent-style-name="Heading_20_3">
      <style:text-properties officeooo:paragraph-rsid="000f9594"/>
    </style:style>
    <style:style style:name="P7" style:family="paragraph" style:parent-style-name="Horizontal_20_Line">
      <style:text-properties fo:font-size="8pt" officeooo:paragraph-rsid="000f9594" style:font-size-asian="8pt" style:font-size-complex="8pt"/>
    </style:style>
    <style:style style:name="P8" style:family="paragraph" style:parent-style-name="Horizontal_20_Line">
      <style:text-properties officeooo:paragraph-rsid="000f9594"/>
    </style:style>
    <style:style style:name="P9" style:family="paragraph" style:parent-style-name="Preformatted_20_Text">
      <style:paragraph-properties fo:margin-left="0cm" fo:margin-right="0cm" fo:text-indent="0cm" style:auto-text-indent="false"/>
      <style:text-properties officeooo:paragraph-rsid="000f9594"/>
    </style:style>
    <style:style style:name="P10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/>
      <style:text-properties officeooo:paragraph-rsid="000f9594"/>
    </style:style>
    <style:style style:name="P11" style:family="paragraph" style:parent-style-name="Preformatted_20_Text">
      <style:text-properties officeooo:paragraph-rsid="000f9594"/>
    </style:style>
    <style:style style:name="P12" style:family="paragraph" style:parent-style-name="Preformatted_20_Text">
      <style:paragraph-properties fo:margin-top="0cm" fo:margin-bottom="0.499cm" style:contextual-spacing="false"/>
      <style:text-properties officeooo:paragraph-rsid="000f9594"/>
    </style:style>
    <style:style style:name="P13" style:family="paragraph" style:parent-style-name="Standard">
      <style:text-properties fo:font-size="8pt" officeooo:rsid="00068aa6" officeooo:paragraph-rsid="000f9594" style:font-size-asian="8pt" style:font-size-complex="8pt"/>
    </style:style>
    <style:style style:name="P14" style:family="paragraph" style:parent-style-name="Standard">
      <style:text-properties officeooo:rsid="00068aa6" officeooo:paragraph-rsid="000f9594"/>
    </style:style>
    <style:style style:name="P15" style:family="paragraph" style:parent-style-name="Table_20_Contents">
      <style:text-properties officeooo:paragraph-rsid="000f9594"/>
    </style:style>
    <style:style style:name="P16" style:family="paragraph" style:parent-style-name="Table_20_Heading">
      <style:text-properties officeooo:paragraph-rsid="000f9594"/>
    </style:style>
    <style:style style:name="P17" style:family="paragraph" style:parent-style-name="Text_20_body">
      <style:text-properties officeooo:rsid="00068aa6" officeooo:paragraph-rsid="000f9594"/>
    </style:style>
    <style:style style:name="P18" style:family="paragraph" style:parent-style-name="Text_20_body" style:list-style-name="L1">
      <style:paragraph-properties fo:margin-top="0cm" fo:margin-bottom="0cm" style:contextual-spacing="false"/>
      <style:text-properties officeooo:paragraph-rsid="000f9594"/>
    </style:style>
    <style:style style:name="P19" style:family="paragraph" style:parent-style-name="Text_20_body" style:list-style-name="L1">
      <style:text-properties officeooo:paragraph-rsid="000f9594"/>
    </style:style>
    <style:style style:name="P20" style:family="paragraph" style:parent-style-name="Text_20_body" style:list-style-name="L16">
      <style:paragraph-properties fo:margin-top="0cm" fo:margin-bottom="0cm" style:contextual-spacing="false"/>
      <style:text-properties fo:font-size="8pt" officeooo:paragraph-rsid="000f9594" style:font-size-asian="8pt" style:font-size-complex="8pt"/>
    </style:style>
    <style:style style:name="P21" style:family="paragraph" style:parent-style-name="Text_20_body" style:list-style-name="L16">
      <style:text-properties fo:font-size="8pt" officeooo:paragraph-rsid="000f9594" style:font-size-asian="8pt" style:font-size-complex="8pt"/>
    </style:style>
    <style:style style:name="P22" style:family="paragraph" style:parent-style-name="Text_20_body" style:list-style-name="L17">
      <style:paragraph-properties fo:margin-top="0cm" fo:margin-bottom="0cm" style:contextual-spacing="false"/>
      <style:text-properties fo:font-size="8pt" officeooo:paragraph-rsid="000f9594" style:font-size-asian="8pt" style:font-size-complex="8pt"/>
    </style:style>
    <style:style style:name="P23" style:family="paragraph" style:parent-style-name="Text_20_body" style:list-style-name="L18">
      <style:paragraph-properties fo:margin-top="0cm" fo:margin-bottom="0cm" style:contextual-spacing="false"/>
      <style:text-properties fo:font-size="8pt" officeooo:paragraph-rsid="000f9594" style:font-size-asian="8pt" style:font-size-complex="8pt"/>
    </style:style>
    <style:style style:name="P24" style:family="paragraph" style:parent-style-name="Text_20_body" style:list-style-name="L18">
      <style:text-properties fo:font-size="8pt" officeooo:paragraph-rsid="000f9594" style:font-size-asian="8pt" style:font-size-complex="8pt"/>
    </style:style>
    <style:style style:name="P25" style:family="paragraph" style:parent-style-name="Text_20_body" style:list-style-name="L19">
      <style:paragraph-properties fo:margin-top="0cm" fo:margin-bottom="0cm" style:contextual-spacing="false"/>
      <style:text-properties fo:font-size="8pt" officeooo:paragraph-rsid="000f9594" style:font-size-asian="8pt" style:font-size-complex="8pt"/>
    </style:style>
    <style:style style:name="P26" style:family="paragraph" style:parent-style-name="Text_20_body" style:list-style-name="L19">
      <style:text-properties fo:font-size="8pt" officeooo:paragraph-rsid="000f9594" style:font-size-asian="8pt" style:font-size-complex="8pt"/>
    </style:style>
    <style:style style:name="P27" style:family="paragraph" style:parent-style-name="Text_20_body" style:list-style-name="L20">
      <style:paragraph-properties fo:margin-top="0cm" fo:margin-bottom="0cm" style:contextual-spacing="false"/>
      <style:text-properties fo:font-size="8pt" officeooo:paragraph-rsid="000f9594" style:font-size-asian="8pt" style:font-size-complex="8pt"/>
    </style:style>
    <style:style style:name="P28" style:family="paragraph" style:parent-style-name="Text_20_body" style:list-style-name="L20">
      <style:text-properties fo:font-size="8pt" officeooo:paragraph-rsid="000f9594" style:font-size-asian="8pt" style:font-size-complex="8pt"/>
    </style:style>
    <style:style style:name="P29" style:family="paragraph" style:parent-style-name="Text_20_body" style:list-style-name="L21">
      <style:text-properties fo:font-size="8pt" officeooo:paragraph-rsid="000f9594" style:font-size-asian="8pt" style:font-size-complex="8pt"/>
    </style:style>
    <style:style style:name="P30" style:family="paragraph" style:parent-style-name="Text_20_body" style:list-style-name="L22">
      <style:text-properties fo:font-size="8pt" officeooo:paragraph-rsid="000f9594" style:font-size-asian="8pt" style:font-size-complex="8pt"/>
    </style:style>
    <style:style style:name="P31" style:family="paragraph" style:parent-style-name="Text_20_body">
      <style:text-properties fo:font-size="8pt" officeooo:paragraph-rsid="000f9594" style:font-size-asian="8pt" style:font-size-complex="8pt"/>
    </style:style>
    <style:style style:name="P32" style:family="paragraph" style:parent-style-name="Text_20_body">
      <style:text-properties fo:font-size="8pt" officeooo:rsid="00068aa6" officeooo:paragraph-rsid="000f9594" style:font-size-asian="8pt" style:font-size-complex="8pt"/>
    </style:style>
    <style:style style:name="P33" style:family="paragraph" style:parent-style-name="Text_20_body" style:list-style-name="L13">
      <style:paragraph-properties fo:margin-top="0cm" fo:margin-bottom="0cm" style:contextual-spacing="false"/>
      <style:text-properties officeooo:paragraph-rsid="000f9594"/>
    </style:style>
    <style:style style:name="P34" style:family="paragraph" style:parent-style-name="Text_20_body" style:list-style-name="L13">
      <style:text-properties officeooo:paragraph-rsid="000f9594"/>
    </style:style>
    <style:style style:name="P35" style:family="paragraph" style:parent-style-name="Text_20_body" style:list-style-name="L14">
      <style:paragraph-properties fo:margin-top="0cm" fo:margin-bottom="0cm" style:contextual-spacing="false"/>
      <style:text-properties officeooo:paragraph-rsid="000f9594"/>
    </style:style>
    <style:style style:name="P36" style:family="paragraph" style:parent-style-name="Text_20_body" style:list-style-name="L14">
      <style:text-properties officeooo:paragraph-rsid="000f9594"/>
    </style:style>
    <style:style style:name="P37" style:family="paragraph" style:parent-style-name="Text_20_body" style:list-style-name="L15">
      <style:paragraph-properties fo:margin-top="0cm" fo:margin-bottom="0cm" style:contextual-spacing="false"/>
      <style:text-properties officeooo:paragraph-rsid="000f9594"/>
    </style:style>
    <style:style style:name="P38" style:family="paragraph" style:parent-style-name="Text_20_body" style:list-style-name="L15">
      <style:text-properties officeooo:paragraph-rsid="000f9594"/>
    </style:style>
    <style:style style:name="P39" style:family="paragraph" style:parent-style-name="Text_20_body" style:list-style-name="L16">
      <style:paragraph-properties fo:margin-top="0cm" fo:margin-bottom="0cm" style:contextual-spacing="false"/>
      <style:text-properties officeooo:paragraph-rsid="000f9594"/>
    </style:style>
    <style:style style:name="P40" style:family="paragraph" style:parent-style-name="Text_20_body" style:list-style-name="L17">
      <style:paragraph-properties fo:margin-top="0cm" fo:margin-bottom="0cm" style:contextual-spacing="false"/>
      <style:text-properties officeooo:paragraph-rsid="000f9594"/>
    </style:style>
    <style:style style:name="P41" style:family="paragraph" style:parent-style-name="Text_20_body" style:list-style-name="L17">
      <style:text-properties officeooo:paragraph-rsid="000f9594"/>
    </style:style>
    <style:style style:name="P42" style:family="paragraph" style:parent-style-name="Text_20_body" style:list-style-name="L23">
      <style:paragraph-properties fo:margin-top="0cm" fo:margin-bottom="0cm" style:contextual-spacing="false"/>
      <style:text-properties officeooo:paragraph-rsid="000f9594"/>
    </style:style>
    <style:style style:name="P43" style:family="paragraph" style:parent-style-name="Text_20_body" style:list-style-name="L23">
      <style:text-properties officeooo:paragraph-rsid="000f9594"/>
    </style:style>
    <style:style style:name="P44" style:family="paragraph" style:parent-style-name="Text_20_body">
      <style:text-properties officeooo:paragraph-rsid="000f9594"/>
    </style:style>
    <style:style style:name="P45" style:family="paragraph" style:parent-style-name="Text_20_body" style:list-style-name="L24"/>
    <style:style style:name="P46" style:family="paragraph" style:parent-style-name="Text_20_body" style:list-style-name="L24">
      <style:paragraph-properties fo:margin-top="0cm" fo:margin-bottom="0cm" style:contextual-spacing="false"/>
    </style:style>
    <style:style style:name="P47" style:family="paragraph" style:parent-style-name="Text_20_body" style:list-style-name="L25"/>
    <style:style style:name="P48" style:family="paragraph" style:parent-style-name="Text_20_body" style:list-style-name="L25">
      <style:paragraph-properties fo:margin-top="0cm" fo:margin-bottom="0cm" style:contextual-spacing="false"/>
    </style:style>
    <style:style style:name="P49" style:family="paragraph" style:parent-style-name="Text_20_body" style:list-style-name="L26"/>
    <style:style style:name="P50" style:family="paragraph" style:parent-style-name="Text_20_body" style:list-style-name="L26">
      <style:paragraph-properties fo:margin-top="0cm" fo:margin-bottom="0cm" style:contextual-spacing="false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officeooo:rsid="001182e9"/>
    </style:style>
    <style:style style:name="Sect1" style:family="section">
      <style:section-properties style:writing-mode="lr-tb"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/>
      <text:p text:style-name="P44"><text:span text:style-name="Strong_20_Emphasis">odoo-ai-vendor-bill-import</text:span></text:p>
      <text:h text:style-name="P6" text:outline-level="3">V1 (la més senzilla)</text:h>
      <text:list text:style-name="L1">
        <text:list-item>
          <text:p text:style-name="P18">Puges un PDF manualment. </text:p>
        </text:list-item>
        <text:list-item>
          <text:p text:style-name="P18">IA → JSON. </text:p>
        </text:list-item>
        <text:list-item>
          <text:p text:style-name="P19">Crear Vendor Bill. </text:p>
        </text:list-item>
      </text:list>
      <text:h text:style-name="P6" text:outline-level="3">V2</text:h>
      <text:p text:style-name="P44">Una carpeta:</text:p>
      <text:section text:style-name="Sect1" text:name="code-block-viewer">
        <text:p text:style-name="P9"><text:span text:style-name="Source_20_Text">incoming_invoices/</text:span></text:p>
        <text:p text:style-name="P11"><text:span text:style-name="Source_20_Text"><text:s text:c="4"/>amazon_001.pdf</text:span></text:p>
        <text:p text:style-name="P11"><text:span text:style-name="Source_20_Text"><text:s text:c="4"/>hp_002.pdf</text:span></text:p>
        <text:p text:style-name="P12"><text:span text:style-name="Source_20_Text"><text:s text:c="4"/>vodafone.pdf</text:span></text:p>
      </text:section>
      <text:p text:style-name="P44">Un cron cada 5 minuts:</text:p>
      <text:list text:style-name="L13">
        <text:list-item>
          <text:p text:style-name="P33">detecta PDFs nous, </text:p>
        </text:list-item>
        <text:list-item>
          <text:p text:style-name="P33">els envia a la IA, </text:p>
        </text:list-item>
        <text:list-item>
          <text:p text:style-name="P33">crea les Vendor Bills, </text:p>
        </text:list-item>
        <text:list-item>
          <text:p text:style-name="P34">mou els PDFs a <text:span text:style-name="Source_20_Text">processed/</text:span>. </text:p>
        </text:list-item>
      </text:list>
      <text:h text:style-name="P6" text:outline-level="3">V3 (molt professional)</text:h>
      <text:p text:style-name="P44">En lloc d'una carpeta, una bústia de correu:</text:p>
      <text:section text:style-name="Sect1" text:name="Secció1">
        <text:p text:style-name="P10"><text:bookmark text:name="code-block-viewer"/><text:span text:style-name="Source_20_Text">factures@empresa.com</text:span></text:p>
      </text:section>
      <text:p text:style-name="P44">El sistema:</text:p>
      <text:list text:style-name="L14">
        <text:list-item>
          <text:p text:style-name="P35">llegeix els correus, </text:p>
        </text:list-item>
        <text:list-item>
          <text:p text:style-name="P35">descarrega els PDFs, </text:p>
        </text:list-item>
        <text:list-item>
          <text:p text:style-name="P35">processa les factures, </text:p>
        </text:list-item>
        <text:list-item>
          <text:p text:style-name="P35">crea les Vendor Bills, </text:p>
        </text:list-item>
        <text:list-item>
          <text:p text:style-name="P36">arxiva el correu. </text:p>
        </text:list-item>
      </text:list>
      <text:p text:style-name="P44">Això és molt habitual en empreses.</text:p>
      <text:p text:style-name="P8"/>
      <text:h text:style-name="P3" text:outline-level="2">Jo faria aquest camí</text:h>
      <text:list text:style-name="L15">
        <text:list-item>
          <text:p text:style-name="P37">✅ Un PDF. </text:p>
        </text:list-item>
        <text:list-item>
          <text:p text:style-name="P37">✅ Diversos PDFs d'una carpeta. </text:p>
        </text:list-item>
        <text:list-item>
          <text:p text:style-name="P37">✅ Evitar duplicats (mateix número de factura). </text:p>
        </text:list-item>
        <text:list-item>
          <text:p text:style-name="P37">✅ Correu electrònic. </text:p>
        </text:list-item>
        <text:list-item>
          <text:p text:style-name="P37">✅ Crear el proveïdor si no existeix. </text:p>
        </text:list-item>
        <text:list-item>
          <text:p text:style-name="P38">✅ Detectar les línies de factura. </text:p>
        </text:list-item>
      </text:list>
      <text:p text:style-name="P44">Això ja és un projecte de nivell <text:span text:style-name="Strong_20_Emphasis">mid-level</text:span> molt seriós.</text:p>
      <text:p text:style-name="P44"><text:soft-page-break/>I hi ha un detall que m'agrada especialment: <text:span text:style-name="Strong_20_Emphasis">pots fer-lo créixer gairebé tant com vulguis</text:span>. La V1 la pots tenir en pocs dies i és perfectament presentable al GitHub. Les versions posteriors afegeixen funcionalitats sense haver de refer tota l'arquitectura. És un tipus de projecte molt agraït per aprendre i demostrar evolució.</text:p>
      <text:p text:style-name="P14"/>
      <text:p text:style-name="P14"/>
      <table:table table:name="Taula1" table:style-name="Taula1">
        <table:table-column table:style-name="Taula1.A"/>
        <table:table-column table:style-name="Taula1.B"/>
        <table:table-column table:style-name="Taula1.C"/>
        <table:table-header-rows>
          <table:table-row>
            <table:table-cell table:style-name="Taula1.A1" office:value-type="string">
              <text:p text:style-name="P16">Sprint</text:p>
            </table:table-cell>
            <table:table-cell table:style-name="Taula1.A1" office:value-type="string">
              <text:p text:style-name="P16">Contingut</text:p>
            </table:table-cell>
            <table:table-cell table:style-name="Taula1.A1" office:value-type="string">
              <text:p text:style-name="P16">Hores</text:p>
            </table:table-cell>
          </table:table-row>
        </table:table-header-rows>
        <table:table-row>
          <table:table-cell table:style-name="Taula1.A1" office:value-type="string">
            <text:p text:style-name="P15">✅ 1</text:p>
          </table:table-cell>
          <table:table-cell table:style-name="Taula1.A1" office:value-type="string">
            <text:p text:style-name="P15">Mòdul Odoo, models, vistes, menú, Git, Docker</text:p>
          </table:table-cell>
          <table:table-cell table:style-name="Taula1.A1" office:value-type="string">
            <text:p text:style-name="P15"><text:span text:style-name="Strong_20_Emphasis">3-4 h</text:span> (fet)</text:p>
          </table:table-cell>
        </table:table-row>
        <table:table-row>
          <table:table-cell table:style-name="Taula1.A1" office:value-type="string">
            <text:p text:style-name="P15">2</text:p>
          </table:table-cell>
          <table:table-cell table:style-name="Taula1.A1" office:value-type="string">
            <text:p text:style-name="P15">Pujar PDF i desar-lo com a adjunt</text:p>
          </table:table-cell>
          <table:table-cell table:style-name="Taula1.A1" office:value-type="string">
            <text:p text:style-name="P15"><text:span text:style-name="Strong_20_Emphasis">2-3 h</text:span></text:p>
          </table:table-cell>
        </table:table-row>
        <table:table-row>
          <table:table-cell table:style-name="Taula1.A1" office:value-type="string">
            <text:p text:style-name="P15">3</text:p>
          </table:table-cell>
          <table:table-cell table:style-name="Taula1.A1" office:value-type="string">
            <text:p text:style-name="P15">OCR (extracció del text del PDF)</text:p>
          </table:table-cell>
          <table:table-cell table:style-name="Taula1.A1" office:value-type="string">
            <text:p text:style-name="P15"><text:span text:style-name="Strong_20_Emphasis">3-5 h</text:span></text:p>
          </table:table-cell>
        </table:table-row>
        <table:table-row>
          <table:table-cell table:style-name="Taula1.A1" office:value-type="string">
            <text:p text:style-name="P15">4</text:p>
          </table:table-cell>
          <table:table-cell table:style-name="Taula1.A1" office:value-type="string">
            <text:p text:style-name="P15">IA: interpretar el text (proveïdor, data, import, IVA...)</text:p>
          </table:table-cell>
          <table:table-cell table:style-name="Taula1.A1" office:value-type="string">
            <text:p text:style-name="P15"><text:span text:style-name="Strong_20_Emphasis">4-6 h</text:span></text:p>
          </table:table-cell>
        </table:table-row>
        <table:table-row>
          <table:table-cell table:style-name="Taula1.A1" office:value-type="string">
            <text:p text:style-name="P15">5</text:p>
          </table:table-cell>
          <table:table-cell table:style-name="Taula1.A1" office:value-type="string">
            <text:p text:style-name="P15">Crear la factura de proveïdor a Odoo</text:p>
          </table:table-cell>
          <table:table-cell table:style-name="Taula1.A1" office:value-type="string">
            <text:p text:style-name="P15"><text:span text:style-name="Strong_20_Emphasis">3-5 h</text:span></text:p>
          </table:table-cell>
        </table:table-row>
        <table:table-row>
          <table:table-cell table:style-name="Taula1.A1" office:value-type="string">
            <text:p text:style-name="P15">6</text:p>
          </table:table-cell>
          <table:table-cell table:style-name="Taula1.A1" office:value-type="string">
            <text:p text:style-name="P15">Validacions, millora UI, gestió d'errors</text:p>
          </table:table-cell>
          <table:table-cell table:style-name="Taula1.A1" office:value-type="string">
            <text:p text:style-name="P15"><text:span text:style-name="Strong_20_Emphasis">3-4 h</text:span></text:p>
          </table:table-cell>
        </table:table-row>
        <table:table-row>
          <table:table-cell table:style-name="Taula1.A1" office:value-type="string">
            <text:p text:style-name="P15">7</text:p>
          </table:table-cell>
          <table:table-cell table:style-name="Taula1.A1" office:value-type="string">
            <text:p text:style-name="P15">README, captures, vídeo, GitHub</text:p>
          </table:table-cell>
          <table:table-cell table:style-name="Taula1.A1" office:value-type="string">
            <text:p text:style-name="P15"><text:span text:style-name="Strong_20_Emphasis">2-3 h</text:span></text:p>
          </table:table-cell>
        </table:table-row>
      </table:table>
      <text:h text:style-name="P6" text:outline-level="3">Total</text:h>
      <text:p text:style-name="P44"><text:span text:style-name="Strong_20_Emphasis">20-30 hores</text:span> aproximadament.</text:p>
      <text:h text:style-name="P1" text:outline-level="2">Resum</text:h>
      <text:p text:style-name="P44"><text:span text:style-name="T1">Hem començat el projecte </text:span><text:span text:style-name="Source_20_Text"><text:span text:style-name="T1">odoo-ai-vendor-bill-import</text:span></text:span><text:span text:style-name="T1"> seguint una metodologia més professional:</text:span></text:p>
      <text:list text:style-name="L16">
        <text:list-item>
          <text:p text:style-name="P39"><text:span text:style-name="T1">Repositori Git des del primer dia (</text:span><text:span text:style-name="Source_20_Text"><text:span text:style-name="T1">main</text:span></text:span><text:span text:style-name="T1">). </text:span></text:p>
        </text:list-item>
        <text:list-item>
          <text:p text:style-name="P20">Estructura del projecte (addons, ai, tests, docs...). </text:p>
        </text:list-item>
        <text:list-item>
          <text:p text:style-name="P20">Mòdul Odoo instal·lable amb model, vistes, menú i permisos. </text:p>
        </text:list-item>
        <text:list-item>
          <text:p text:style-name="P39"><text:span text:style-name="T1">Possibilitat de pujar un PDF i marcar-lo com a </text:span><text:span text:style-name="Emphasis"><text:span text:style-name="T1">Uploaded</text:span></text:span><text:span text:style-name="T1">. </text:span></text:p>
        </text:list-item>
        <text:list-item>
          <text:p text:style-name="P39"><text:span text:style-name="T1">Camp </text:span><text:span text:style-name="Source_20_Text"><text:span text:style-name="T1">extracted_text</text:span></text:span><text:span text:style-name="T1"> i botó </text:span><text:span text:style-name="Strong_20_Emphasis"><text:span text:style-name="T1">Extract Text</text:span></text:span><text:span text:style-name="T1"> (de moment amb text fictici per validar el flux). </text:span></text:p>
        </text:list-item>
        <text:list-item>
          <text:p text:style-name="P20">Hem introduït Git com a part del desenvolupament (commits petits i coherents). </text:p>
        </text:list-item>
        <text:list-item>
          <text:p text:style-name="P39"><text:span text:style-name="T1">Hem creat una carpeta </text:span><text:span text:style-name="Source_20_Text"><text:span text:style-name="T1">tests/</text:span></text:span><text:span text:style-name="T1"> per provar tecnologies abans d'integrar-les a Odoo. </text:span></text:p>
        </text:list-item>
        <text:list-item>
          <text:p text:style-name="P20">Hem provat dues estratègies: </text:p>
          <text:list>
            <text:list-item>
              <text:p text:style-name="P39"><text:span text:style-name="Strong_20_Emphasis"><text:span text:style-name="T1">PyMuPDF</text:span></text:span><text:span text:style-name="T1"> per llegir PDFs que ja contenen text. </text:span></text:p>
            </text:list-item>
            <text:list-item>
              <text:p text:style-name="P39"><text:span text:style-name="Strong_20_Emphasis"><text:span text:style-name="T1">pdf2image + Tesseract</text:span></text:span><text:span text:style-name="T1"> per PDFs escanejats. </text:span></text:p>
            </text:list-item>
          </text:list>
        </text:list-item>
        <text:list-item>
          <text:p text:style-name="P21">Hem decidit que l'aplicació detectarà automàticament quin mètode utilitzar. </text:p>
        </text:list-item>
      </text:list>
      <text:h text:style-name="P2" text:outline-level="2">Arquitectura prevista</text:h>
      <text:section text:style-name="Sect1" text:name="Secció2">
        <text:p text:style-name="P9"><text:bookmark text:name="Còpia de code-block-viewer 1"/><text:span text:style-name="Source_20_Text"><text:span text:style-name="T1">PDF</text:span></text:span></text:p>
        <text:p text:style-name="P11"><text:span text:style-name="Source_20_Text"><text:span text:style-name="T1"><text:s/>│</text:span></text:span></text:p>
        <text:p text:style-name="P11"><text:span text:style-name="Source_20_Text"><text:span text:style-name="T1"><text:s/>├── Té text → PyMuPDF</text:span></text:span></text:p>
        <text:p text:style-name="P11"><text:span text:style-name="Source_20_Text"><text:span text:style-name="T1"><text:s/>│</text:span></text:span></text:p>
        <text:p text:style-name="P11"><text:span text:style-name="Source_20_Text"><text:span text:style-name="T1"><text:s/>└── Escanejat → OCR</text:span></text:span></text:p>
        <text:p text:style-name="P11"><text:span text:style-name="Source_20_Text"><text:span text:style-name="T1"><text:s text:c="8"/>│</text:span></text:span></text:p>
        <text:p text:style-name="P11"><text:span text:style-name="Source_20_Text"><text:span text:style-name="T1"><text:s text:c="8"/>▼</text:span></text:span></text:p>
        <text:p text:style-name="P11"><text:span text:style-name="Source_20_Text"><text:span text:style-name="T1"><text:s text:c="5"/>Text extret</text:span></text:span></text:p>
        <text:p text:style-name="P11"><text:span text:style-name="Source_20_Text"><text:span text:style-name="T1"><text:s text:c="8"/>│</text:span></text:span></text:p>
        <text:p text:style-name="P11"><text:span text:style-name="Source_20_Text"><text:span text:style-name="T1"><text:s text:c="8"/>▼</text:span></text:span></text:p>
        <text:p text:style-name="P11"><text:span text:style-name="Source_20_Text"><text:span text:style-name="T1"><text:s text:c="8"/>IA</text:span></text:span></text:p>
        <text:p text:style-name="P11"><text:span text:style-name="Source_20_Text"><text:span text:style-name="T1"><text:s text:c="8"/>│</text:span></text:span></text:p>
        <text:p text:style-name="P11"><text:span text:style-name="Source_20_Text"><text:span text:style-name="T1"><text:s text:c="8"/>▼</text:span></text:span></text:p>
        <text:p text:style-name="P11"><text:span text:style-name="Source_20_Text"><text:span text:style-name="T1">JSON amb:</text:span></text:span></text:p>
        <text:p text:style-name="P11"><text:span text:style-name="Source_20_Text"><text:span text:style-name="T1">- proveïdor</text:span></text:span></text:p>
        <text:p text:style-name="P11"><text:span text:style-name="Source_20_Text"><text:span text:style-name="T1">- número de factura</text:span></text:span></text:p>
        <text:p text:style-name="P11"><text:span text:style-name="Source_20_Text"><text:span text:style-name="T1">- data</text:span></text:span></text:p>
        <text:p text:style-name="P11"><text:span text:style-name="Source_20_Text"><text:span text:style-name="T1">- imports</text:span></text:span></text:p>
        <text:p text:style-name="P11"><text:span text:style-name="Source_20_Text"><text:span text:style-name="T1">- IVA</text:span></text:span></text:p>
        <text:p text:style-name="P11"><text:span text:style-name="Source_20_Text"><text:span text:style-name="T1"><text:s text:c="8"/>│</text:span></text:span></text:p>
        <text:p text:style-name="P11"><text:span text:style-name="Source_20_Text"><text:span text:style-name="T1"><text:s text:c="8"/>▼</text:span></text:span></text:p>
        <text:p text:style-name="P12"><text:span text:style-name="Source_20_Text"><text:span text:style-name="T1">Crear Vendor Bill a Odoo</text:span></text:span></text:p>
      </text:section>
      <text:h text:style-name="P2" text:outline-level="2"><text:soft-page-break/>Següent pas</text:h>
      <text:list text:style-name="L17">
        <text:list-item>
          <text:p text:style-name="P40"><text:span text:style-name="T1">Acabar el prototip OCR a </text:span><text:span text:style-name="Source_20_Text"><text:span text:style-name="T1">tests/</text:span></text:span><text:span text:style-name="T1">. </text:span></text:p>
        </text:list-item>
        <text:list-item>
          <text:p text:style-name="P40"><text:span text:style-name="T1">Crear </text:span><text:span text:style-name="Source_20_Text"><text:span text:style-name="T1">ai/pdf_extractor.py</text:span></text:span><text:span text:style-name="T1"> reutilitzable. </text:span></text:p>
        </text:list-item>
        <text:list-item>
          <text:p text:style-name="P40"><text:span text:style-name="T1">Integrar-lo amb el botó </text:span><text:span text:style-name="Strong_20_Emphasis"><text:span text:style-name="T1">Extract Text</text:span></text:span><text:span text:style-name="T1"> d'Odoo. </text:span></text:p>
        </text:list-item>
        <text:list-item>
          <text:p text:style-name="P22">Quan el text aparegui a Odoo, integrar la IA perquè retorni les dades estructurades. </text:p>
        </text:list-item>
        <text:list-item>
          <text:p text:style-name="P41"><text:span text:style-name="T1">Finalment, crear automàticament la factura de proveïdor (</text:span><text:span text:style-name="Source_20_Text"><text:span text:style-name="T1">account.move</text:span></text:span><text:span text:style-name="T1">) i preparar README, captures i vídeo per publicar el projecte a GitHub.</text:span></text:p>
        </text:list-item>
      </text:list>
      <text:p text:style-name="P13">---------------------------</text:p>
      <text:p text:style-name="P13"/>
      <text:h text:style-name="P5" text:outline-level="3"><text:span text:style-name="T2">E</text:span>stat actual</text:h>
      <text:p text:style-name="Text_20_body">✅ Mòdul Odoo funcional amb menú, permisos i vistes.</text:p>
      <text:p text:style-name="Text_20_body">✅ Permet pujar:</text:p>
      <text:list text:style-name="L24">
        <text:list-item>
          <text:p text:style-name="P46">PDF amb text </text:p>
        </text:list-item>
        <text:list-item>
          <text:p text:style-name="P46">PDF escanejat </text:p>
        </text:list-item>
        <text:list-item>
          <text:p text:style-name="P45">JPG / PNG </text:p>
        </text:list-item>
      </text:list>
      <text:p text:style-name="Text_20_body">✅ Detecta automàticament el tipus de document:</text:p>
      <text:list text:style-name="L25">
        <text:list-item>
          <text:p text:style-name="P48">PDF amb text → PyMuPDF </text:p>
        </text:list-item>
        <text:list-item>
          <text:p text:style-name="P48">PDF escanejat → OCR (Tesseract) </text:p>
        </text:list-item>
        <text:list-item>
          <text:p text:style-name="P47">Imatge → OCR </text:p>
        </text:list-item>
      </text:list>
      <text:p text:style-name="Text_20_body">✅ Extreu el text real i l'emmagatzema a <text:span text:style-name="Source_20_Text">extracted_text</text:span> dins d'Odoo.</text:p>
      <text:p text:style-name="Text_20_body">✅ Docker i el projecte ja s'estan preparant perquè totes les dependències quedin automatitzades.</text:p>
      <text:p text:style-name="Horizontal_20_Line"/>
      <text:h text:style-name="Heading_20_3" text:outline-level="3">Propers passos</text:h>
      <text:list text:style-name="L26">
        <text:list-item>
          <text:p text:style-name="P50">✅ Acabar el <text:span text:style-name="Source_20_Text">Dockerfile</text:span> i el <text:span text:style-name="Source_20_Text">docker-compose</text:span>. </text:p>
        </text:list-item>
        <text:list-item>
          <text:p text:style-name="P50">Crear <text:span text:style-name="Source_20_Text">ai_parser.py</text:span> perquè la IA converteixi el text en: </text:p>
          <text:list>
            <text:list-item>
              <text:p text:style-name="P50">proveïdor </text:p>
            </text:list-item>
            <text:list-item>
              <text:p text:style-name="P50">número de factura </text:p>
            </text:list-item>
            <text:list-item>
              <text:p text:style-name="P50">data </text:p>
            </text:list-item>
            <text:list-item>
              <text:p text:style-name="P50">base </text:p>
            </text:list-item>
            <text:list-item>
              <text:p text:style-name="P50">IVA </text:p>
            </text:list-item>
            <text:list-item>
              <text:p text:style-name="P50">total </text:p>
            </text:list-item>
          </text:list>
        </text:list-item>
        <text:list-item>
          <text:p text:style-name="P50">Crear automàticament el <text:span text:style-name="Source_20_Text">Vendor Bill</text:span> (<text:span text:style-name="Source_20_Text">account.move</text:span>) a Odoo. </text:p>
        </text:list-item>
        <text:list-item>
          <text:p text:style-name="P50">Polir la interfície. </text:p>
        </text:list-item>
        <text:list-item>
          <text:p text:style-name="P49">README, captures, vídeo i publicar el repositori a GitHub. </text:p>
        </text:list-item>
      </text:list>
      <text:p text:style-name="Text_20_body">Aquest projecte ja comença a semblar una aplicació real d'automatització documental, no només un mòdul d'Odoo.</text:p>
      <text:p text:style-name="P3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6-22T22:34:19.216145825</meta:creation-date>
    <dc:date>2026-06-22T23:42:59.659543145</dc:date>
    <meta:editing-duration>PT58M28S</meta:editing-duration>
    <meta:editing-cycles>1</meta:editing-cycles>
    <meta:document-statistic meta:table-count="1" meta:image-count="0" meta:object-count="0" meta:page-count="3" meta:paragraph-count="129" meta:word-count="638" meta:character-count="3744" meta:non-whitespace-character-count="3143"/>
    <meta:generator>LibreOffice/24.2.7.2$Linux_X86_64 LibreOffice_project/420$Build-2</meta:generator>
  </office:meta>
</office:document-meta>
</file>