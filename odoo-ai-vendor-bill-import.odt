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2.663cm" table:align="left"/>
    </style:style>
    <style:style style:name="Taula1.A" style:family="table-column">
      <style:table-column-properties style:column-width="1.367cm"/>
    </style:style>
    <style:style style:name="Taula1.B" style:family="table-column">
      <style:table-column-properties style:column-width="9.29cm"/>
    </style:style>
    <style:style style:name="Taula1.C" style:family="table-column">
      <style:table-column-properties style:column-width="2.006cm"/>
    </style:style>
    <style:style style:name="Tau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text-properties officeooo:rsid="00068aa6" officeooo:paragraph-rsid="00068aa6"/>
    </style:style>
    <style:style style:name="P5" style:family="paragraph" style:parent-style-name="Text_20_body">
      <style:text-properties officeooo:rsid="00068aa6" officeooo:paragraph-rsid="00068aa6"/>
    </style:style>
    <style:style style:name="P6" style:family="paragraph" style:parent-style-name="Horizontal_20_Line">
      <style:text-properties fo:font-size="8pt" style:font-size-asian="8pt" style:font-size-complex="8pt"/>
    </style:style>
    <style:style style:name="P7" style:family="paragraph" style:parent-style-name="Heading_20_2">
      <style:text-properties fo:font-size="8pt" officeooo:rsid="00068aa6" officeooo:paragraph-rsid="00068aa6" style:font-size-asian="8pt" style:font-size-complex="8pt"/>
    </style:style>
    <style:style style:name="P8" style:family="paragraph" style:parent-style-name="Heading_20_2">
      <style:text-properties fo:font-size="8pt" style:font-size-asian="8pt" style:font-size-complex="8pt"/>
    </style:style>
    <style:style style:name="P9" style:family="paragraph" style:parent-style-name="Heading_20_3">
      <style:text-properties fo:font-size="8pt" style:font-size-asian="8pt" style:font-size-complex="8pt"/>
    </style:style>
    <style:style style:name="P10" style:family="paragraph" style:parent-style-name="Preformatted_20_Text">
      <style:paragraph-properties fo:margin-left="0cm" fo:margin-right="0cm" fo:text-indent="0cm" style:auto-text-indent="false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Standard">
      <style:text-properties officeooo:rsid="00068aa6" officeooo:paragraph-rsid="00068aa6"/>
    </style:style>
    <style:style style:name="P14" style:family="paragraph" style:parent-style-name="Standard">
      <style:text-properties fo:font-size="8pt" officeooo:rsid="00068aa6" officeooo:paragraph-rsid="00068aa6" style:font-size-asian="8pt" style:font-size-complex="8pt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 style:list-style-name="L4"/>
    <style:style style:name="P22" style:family="paragraph" style:parent-style-name="Text_20_body" style:list-style-name="L4">
      <style:paragraph-properties fo:margin-top="0cm" fo:margin-bottom="0cm" style:contextual-spacing="false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paragraph-properties fo:margin-top="0cm" fo:margin-bottom="0cm" style:contextual-spacing="false"/>
    </style:style>
    <style:style style:name="P25" style:family="paragraph" style:parent-style-name="Text_20_body" style:list-style-name="L6"/>
    <style:style style:name="P26" style:family="paragraph" style:parent-style-name="Text_20_body" style:list-style-name="L6">
      <style:paragraph-properties fo:margin-top="0cm" fo:margin-bottom="0cm" style:contextual-spacing="false"/>
    </style:style>
    <style:style style:name="P27" style:family="paragraph" style:parent-style-name="Text_20_body" style:list-style-name="L7"/>
    <style:style style:name="P28" style:family="paragraph" style:parent-style-name="Text_20_body" style:list-style-name="L7">
      <style:paragraph-properties fo:margin-top="0cm" fo:margin-bottom="0cm" style:contextual-spacing="false"/>
    </style:style>
    <style:style style:name="P29" style:family="paragraph" style:parent-style-name="Text_20_body" style:list-style-name="L8"/>
    <style:style style:name="P30" style:family="paragraph" style:parent-style-name="Text_20_body" style:list-style-name="L8">
      <style:paragraph-properties fo:margin-top="0cm" fo:margin-bottom="0cm" style:contextual-spacing="false"/>
    </style:style>
    <style:style style:name="P31" style:family="paragraph" style:parent-style-name="Text_20_body" style:list-style-name="L9"/>
    <style:style style:name="P32" style:family="paragraph" style:parent-style-name="Text_20_body" style:list-style-name="L9">
      <style:paragraph-properties fo:margin-top="0cm" fo:margin-bottom="0cm" style:contextual-spacing="false"/>
    </style:style>
    <style:style style:name="P33" style:family="paragraph" style:parent-style-name="Text_20_body" style:list-style-name="L10">
      <style:paragraph-properties fo:margin-top="0cm" fo:margin-bottom="0cm" style:contextual-spacing="false"/>
    </style:style>
    <style:style style:name="P34" style:family="paragraph" style:parent-style-name="Text_20_body" style:list-style-name="L11"/>
    <style:style style:name="P35" style:family="paragraph" style:parent-style-name="Text_20_body" style:list-style-name="L11">
      <style:paragraph-properties fo:margin-top="0cm" fo:margin-bottom="0cm" style:contextual-spacing="false"/>
    </style:style>
    <style:style style:name="P36" style:family="paragraph" style:parent-style-name="Text_20_body" style:list-style-name="L10">
      <style:paragraph-properties fo:margin-top="0cm" fo:margin-bottom="0cm" style:contextual-spacing="false"/>
      <style:text-properties fo:font-size="8pt" style:font-size-asian="8pt" style:font-size-complex="8pt"/>
    </style:style>
    <style:style style:name="P37" style:family="paragraph" style:parent-style-name="Text_20_body" style:list-style-name="L10">
      <style:text-properties fo:font-size="8pt" style:font-size-asian="8pt" style:font-size-complex="8pt"/>
    </style:style>
    <style:style style:name="P38" style:family="paragraph" style:parent-style-name="Text_20_body" style:list-style-name="L11">
      <style:paragraph-properties fo:margin-top="0cm" fo:margin-bottom="0cm" style:contextual-spacing="false"/>
      <style:text-properties fo:font-size="8pt" style:font-size-asian="8pt" style:font-size-complex="8pt"/>
    </style:style>
    <style:style style:name="P39" style:family="paragraph" style:parent-style-name="Text_20_body" style:list-style-name="L12">
      <style:paragraph-properties fo:margin-top="0cm" fo:margin-bottom="0cm" style:contextual-spacing="false"/>
      <style:text-properties fo:font-size="8pt" style:font-size-asian="8pt" style:font-size-complex="8pt"/>
    </style:style>
    <style:style style:name="P40" style:family="paragraph" style:parent-style-name="Text_20_body" style:list-style-name="L12">
      <style:text-properties fo:font-size="8pt" style:font-size-asian="8pt" style:font-size-complex="8pt"/>
    </style:style>
    <style:style style:name="P41" style:family="paragraph" style:parent-style-name="Text_20_body" style:list-style-name="L13">
      <style:paragraph-properties fo:margin-top="0cm" fo:margin-bottom="0cm" style:contextual-spacing="false"/>
      <style:text-properties fo:font-size="8pt" style:font-size-asian="8pt" style:font-size-complex="8pt"/>
    </style:style>
    <style:style style:name="P42" style:family="paragraph" style:parent-style-name="Text_20_body" style:list-style-name="L13">
      <style:text-properties fo:font-size="8pt" style:font-size-asian="8pt" style:font-size-complex="8pt"/>
    </style:style>
    <style:style style:name="P43" style:family="paragraph" style:parent-style-name="Text_20_body" style:list-style-name="L14">
      <style:paragraph-properties fo:margin-top="0cm" fo:margin-bottom="0cm" style:contextual-spacing="false"/>
      <style:text-properties fo:font-size="8pt" style:font-size-asian="8pt" style:font-size-complex="8pt"/>
    </style:style>
    <style:style style:name="P44" style:family="paragraph" style:parent-style-name="Text_20_body" style:list-style-name="L14">
      <style:text-properties fo:font-size="8pt" style:font-size-asian="8pt" style:font-size-complex="8pt"/>
    </style:style>
    <style:style style:name="P45" style:family="paragraph" style:parent-style-name="Text_20_body" style:list-style-name="L15">
      <style:text-properties fo:font-size="8pt" style:font-size-asian="8pt" style:font-size-complex="8pt"/>
    </style:style>
    <style:style style:name="P46" style:family="paragraph" style:parent-style-name="Text_20_body" style:list-style-name="L16">
      <style:text-properties fo:font-size="8pt" style:font-size-asian="8pt" style:font-size-complex="8pt"/>
    </style:style>
    <style:style style:name="P47" style:family="paragraph" style:parent-style-name="Text_20_body">
      <style:text-properties fo:font-size="8pt" style:font-size-asian="8pt" style:font-size-complex="8pt"/>
    </style:style>
    <style:style style:name="P48" style:family="paragraph" style:parent-style-name="Text_20_body" style:list-style-name="L17"/>
    <style:style style:name="P49" style:family="paragraph" style:parent-style-name="Text_20_body" style:list-style-name="L17">
      <style:paragraph-properties fo:margin-top="0cm" fo:margin-bottom="0cm" style:contextual-spacing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odoo-ai-vendor-bill-import</text:span></text:p>
      <text:h text:style-name="Heading_20_2" text:outline-level="2"/>
      <text:h text:style-name="Heading_20_2" text:outline-level="2">Pla de formació (actualitzat)</text:h>
      <text:h text:style-name="Heading_20_3" text:outline-level="3">Objectiu</text:h>
      <text:p text:style-name="Text_20_body">Especialitzar-me en <text:span text:style-name="Strong_20_Emphasis">Odoo</text:span>, <text:span text:style-name="Strong_20_Emphasis">anàlisi forense digital</text:span> i <text:span text:style-name="Strong_20_Emphasis">IA aplicada</text:span> per desenvolupar solucions empresarials amb valor real i construir un perfil competitiu basat en l'experiència pràctica i un bon portfoli.</text:p>
      <text:h text:style-name="Heading_20_3" text:outline-level="3">Distribució del temps</text:h>
      <text:p text:style-name="Text_20_body"><text:span text:style-name="Strong_20_Emphasis">50% Odoo</text:span></text:p>
      <text:list text:style-name="L1">
        <text:list-item>
          <text:p text:style-name="P16">Desenvolupament de mòduls </text:p>
        </text:list-item>
        <text:list-item>
          <text:p text:style-name="P16">APIs REST </text:p>
        </text:list-item>
        <text:list-item>
          <text:p text:style-name="P16">OWL </text:p>
        </text:list-item>
        <text:list-item>
          <text:p text:style-name="P16">Cron </text:p>
        </text:list-item>
        <text:list-item>
          <text:p text:style-name="P16">Docker </text:p>
        </text:list-item>
        <text:list-item>
          <text:p text:style-name="P16">PostgreSQL </text:p>
        </text:list-item>
        <text:list-item>
          <text:p text:style-name="P15">Integracions amb serveis externs </text:p>
        </text:list-item>
      </text:list>
      <text:p text:style-name="Text_20_body"><text:span text:style-name="Strong_20_Emphasis">30% Anàlisi forense digital</text:span></text:p>
      <text:list text:style-name="L2">
        <text:list-item>
          <text:p text:style-name="P18">Autopsy </text:p>
        </text:list-item>
        <text:list-item>
          <text:p text:style-name="P18">SIEM </text:p>
        </text:list-item>
        <text:list-item>
          <text:p text:style-name="P18">Laboratori propi </text:p>
        </text:list-item>
        <text:list-item>
          <text:p text:style-name="P18">Informes forenses </text:p>
        </text:list-item>
        <text:list-item>
          <text:p text:style-name="P17">Creació de casos pràctics per al portfoli </text:p>
        </text:list-item>
      </text:list>
      <text:p text:style-name="Text_20_body"><text:span text:style-name="Strong_20_Emphasis">20% IA aplicada (AI Integration / Applied AI)</text:span></text:p>
      <text:list text:style-name="L3">
        <text:list-item>
          <text:p text:style-name="P20">Integració d'IA en aplicacions existents </text:p>
        </text:list-item>
        <text:list-item>
          <text:p text:style-name="P20">Consum d'APIs d'IA </text:p>
        </text:list-item>
        <text:list-item>
          <text:p text:style-name="P20">Prompt Engineering </text:p>
        </text:list-item>
        <text:list-item>
          <text:p text:style-name="P20">Automatització de processos </text:p>
        </text:list-item>
        <text:list-item>
          <text:p text:style-name="P20">RAG bàsic </text:p>
        </text:list-item>
        <text:list-item>
          <text:p text:style-name="P20">Assistents intel·ligents </text:p>
        </text:list-item>
        <text:list-item>
          <text:p text:style-name="P19">Integració de la IA dins d'Odoo </text:p>
        </text:list-item>
      </text:list>
      <text:h text:style-name="Heading_20_3" text:outline-level="3">Exemples de projectes</text:h>
      <text:list text:style-name="L4">
        <text:list-item>
          <text:p text:style-name="P22">OCR de factures integrat amb Odoo. </text:p>
        </text:list-item>
        <text:list-item>
          <text:p text:style-name="P22">Resum automàtic de correus i incidències. </text:p>
        </text:list-item>
        <text:list-item>
          <text:p text:style-name="P22">Classificació automàtica de documents. </text:p>
        </text:list-item>
        <text:list-item>
          <text:p text:style-name="P22">Cerca intel·ligent dins d'Odoo. </text:p>
        </text:list-item>
        <text:list-item>
          <text:p text:style-name="P21">Automatització de tasques administratives amb IA. </text:p>
        </text:list-item>
      </text:list>
      <text:h text:style-name="Heading_20_3" text:outline-level="3"><text:soft-page-break/>Objectiu professional</text:h>
      <text:p text:style-name="Text_20_body">Construir un perfil de:</text:p>
      <text:list text:style-name="L5">
        <text:list-item>
          <text:p text:style-name="P24"><text:span text:style-name="Strong_20_Emphasis">Odoo Developer</text:span> </text:p>
        </text:list-item>
        <text:list-item>
          <text:p text:style-name="P24"><text:span text:style-name="Strong_20_Emphasis">AI Integration Developer</text:span> (IA aplicada a processos empresarials) </text:p>
        </text:list-item>
        <text:list-item>
          <text:p text:style-name="P23"><text:span text:style-name="Strong_20_Emphasis">Digital Forensics Analyst</text:span> </text:p>
        </text:list-item>
      </text:list>
      <text:p text:style-name="Text_20_body">L'objectiu no és desenvolupar models d'IA des de zero, sinó <text:span text:style-name="Strong_20_Emphasis">integrar-los i aplicar-los per resoldre problemes reals d'empresa</text:span>, combinant Odoo, Python, APIs i automatització. Aquest perfil és plenament compatible amb una formació de CFGS i es basa principalment en l'experiència pràctica i un portfoli sòlid de projectes.</text:p>
      <text:p text:style-name="P4">Projecte</text:p>
      <text:p text:style-name="P4"/>
      <text:p text:style-name="P5">Podries fer diverses versions.</text:p>
      <text:h text:style-name="Heading_20_3" text:outline-level="3">V1 (la més senzilla)</text:h>
      <text:list text:style-name="L6">
        <text:list-item>
          <text:p text:style-name="P26">Puges un PDF manualment. </text:p>
        </text:list-item>
        <text:list-item>
          <text:p text:style-name="P26">IA → JSON. </text:p>
        </text:list-item>
        <text:list-item>
          <text:p text:style-name="P25">Crear Vendor Bill. </text:p>
        </text:list-item>
      </text:list>
      <text:h text:style-name="Heading_20_3" text:outline-level="3">V2</text:h>
      <text:p text:style-name="Text_20_body">Una carpeta:</text:p>
      <text:section text:style-name="Sect1" text:name="code-block-viewer">
        <text:p text:style-name="P1"><text:span text:style-name="Source_20_Text">incoming_invoices/</text:span></text:p>
        <text:p text:style-name="Preformatted_20_Text"><text:span text:style-name="Source_20_Text"><text:s text:c="4"/>amazon_001.pdf</text:span></text:p>
        <text:p text:style-name="Preformatted_20_Text"><text:span text:style-name="Source_20_Text"><text:s text:c="4"/>hp_002.pdf</text:span></text:p>
        <text:p text:style-name="P3"><text:span text:style-name="Source_20_Text"><text:s text:c="4"/>vodafone.pdf</text:span></text:p>
      </text:section>
      <text:p text:style-name="Text_20_body">Un cron cada 5 minuts:</text:p>
      <text:list text:style-name="L7">
        <text:list-item>
          <text:p text:style-name="P28">detecta PDFs nous, </text:p>
        </text:list-item>
        <text:list-item>
          <text:p text:style-name="P28">els envia a la IA, </text:p>
        </text:list-item>
        <text:list-item>
          <text:p text:style-name="P28">crea les Vendor Bills, </text:p>
        </text:list-item>
        <text:list-item>
          <text:p text:style-name="P27">mou els PDFs a <text:span text:style-name="Source_20_Text">processed/</text:span>. </text:p>
        </text:list-item>
      </text:list>
      <text:h text:style-name="Heading_20_3" text:outline-level="3">V3 (molt professional)</text:h>
      <text:p text:style-name="Text_20_body">En lloc d'una carpeta, una bústia de correu:</text:p>
      <text:section text:style-name="Sect1" text:name="Secció1">
        <text:p text:style-name="P2"><text:bookmark text:name="code-block-viewer"/><text:span text:style-name="Source_20_Text">factures@empresa.com</text:span></text:p>
      </text:section>
      <text:p text:style-name="Text_20_body">El sistema:</text:p>
      <text:list text:style-name="L8">
        <text:list-item>
          <text:p text:style-name="P30">llegeix els correus, </text:p>
        </text:list-item>
        <text:list-item>
          <text:p text:style-name="P30">descarrega els PDFs, </text:p>
        </text:list-item>
        <text:list-item>
          <text:p text:style-name="P30">processa les factures, </text:p>
        </text:list-item>
        <text:list-item>
          <text:p text:style-name="P30">crea les Vendor Bills, </text:p>
        </text:list-item>
        <text:list-item>
          <text:p text:style-name="P29">arxiva el correu. </text:p>
        </text:list-item>
      </text:list>
      <text:p text:style-name="Text_20_body">Això és molt habitual en empreses.</text:p>
      <text:p text:style-name="Horizontal_20_Line"/>
      <text:h text:style-name="Heading_20_2" text:outline-level="2"><text:soft-page-break/>Jo faria aquest camí</text:h>
      <text:list text:style-name="L9">
        <text:list-item>
          <text:p text:style-name="P32">✅ Un PDF. </text:p>
        </text:list-item>
        <text:list-item>
          <text:p text:style-name="P32">✅ Diversos PDFs d'una carpeta. </text:p>
        </text:list-item>
        <text:list-item>
          <text:p text:style-name="P32">✅ Evitar duplicats (mateix número de factura). </text:p>
        </text:list-item>
        <text:list-item>
          <text:p text:style-name="P32">✅ Correu electrònic. </text:p>
        </text:list-item>
        <text:list-item>
          <text:p text:style-name="P32">✅ Crear el proveïdor si no existeix. </text:p>
        </text:list-item>
        <text:list-item>
          <text:p text:style-name="P31">✅ Detectar les línies de factura. </text:p>
        </text:list-item>
      </text:list>
      <text:p text:style-name="Text_20_body">Això ja és un projecte de nivell <text:span text:style-name="Strong_20_Emphasis">mid-level</text:span> molt seriós.</text:p>
      <text:p text:style-name="Text_20_body">I hi ha un detall que m'agrada especialment: <text:span text:style-name="Strong_20_Emphasis">pots fer-lo créixer gairebé tant com vulguis</text:span>. La V1 la pots tenir en pocs dies i és perfectament presentable al GitHub. Les versions posteriors afegeixen funcionalitats sense haver de refer tota l'arquitectura. És un tipus de projecte molt agraït per aprendre i demostrar evolució.</text:p>
      <text:p text:style-name="P4"/>
      <text:p text:style-name="P4"/>
      <table:table table:name="Taula1" table:style-name="Taula1">
        <table:table-column table:style-name="Taula1.A"/>
        <table:table-column table:style-name="Taula1.B"/>
        <table:table-column table:style-name="Taula1.C"/>
        <table:table-header-rows>
          <table:table-row>
            <table:table-cell table:style-name="Taula1.A1" office:value-type="string">
              <text:p text:style-name="Table_20_Heading">Sprint</text:p>
            </table:table-cell>
            <table:table-cell table:style-name="Taula1.A1" office:value-type="string">
              <text:p text:style-name="Table_20_Heading">Contingut</text:p>
            </table:table-cell>
            <table:table-cell table:style-name="Taula1.A1" office:value-type="string">
              <text:p text:style-name="Table_20_Heading">Hores</text:p>
            </table:table-cell>
          </table:table-row>
        </table:table-header-rows>
        <table:table-row>
          <table:table-cell table:style-name="Taula1.A1" office:value-type="string">
            <text:p text:style-name="Table_20_Contents">✅ 1</text:p>
          </table:table-cell>
          <table:table-cell table:style-name="Taula1.A1" office:value-type="string">
            <text:p text:style-name="Table_20_Contents">Mòdul Odoo, models, vistes, menú, Git, Docker</text:p>
          </table:table-cell>
          <table:table-cell table:style-name="Taula1.A1" office:value-type="string">
            <text:p text:style-name="Table_20_Contents"><text:span text:style-name="Strong_20_Emphasis">3-4 h</text:span> (fet)</text:p>
          </table:table-cell>
        </table:table-row>
        <table:table-row>
          <table:table-cell table:style-name="Taula1.A1" office:value-type="string">
            <text:p text:style-name="Table_20_Contents">2</text:p>
          </table:table-cell>
          <table:table-cell table:style-name="Taula1.A1" office:value-type="string">
            <text:p text:style-name="Table_20_Contents">Pujar PDF i desar-lo com a adjunt</text:p>
          </table:table-cell>
          <table:table-cell table:style-name="Taula1.A1" office:value-type="string">
            <text:p text:style-name="Table_20_Contents"><text:span text:style-name="Strong_20_Emphasis">2-3 h</text:span></text:p>
          </table:table-cell>
        </table:table-row>
        <table:table-row>
          <table:table-cell table:style-name="Taula1.A1" office:value-type="string">
            <text:p text:style-name="Table_20_Contents">3</text:p>
          </table:table-cell>
          <table:table-cell table:style-name="Taula1.A1" office:value-type="string">
            <text:p text:style-name="Table_20_Contents">OCR (extracció del text del PDF)</text:p>
          </table:table-cell>
          <table:table-cell table:style-name="Taula1.A1" office:value-type="string">
            <text:p text:style-name="Table_20_Contents"><text:span text:style-name="Strong_20_Emphasis">3-5 h</text:span></text:p>
          </table:table-cell>
        </table:table-row>
        <table:table-row>
          <table:table-cell table:style-name="Taula1.A1" office:value-type="string">
            <text:p text:style-name="Table_20_Contents">4</text:p>
          </table:table-cell>
          <table:table-cell table:style-name="Taula1.A1" office:value-type="string">
            <text:p text:style-name="Table_20_Contents">IA: interpretar el text (proveïdor, data, import, IVA...)</text:p>
          </table:table-cell>
          <table:table-cell table:style-name="Taula1.A1" office:value-type="string">
            <text:p text:style-name="Table_20_Contents"><text:span text:style-name="Strong_20_Emphasis">4-6 h</text:span></text:p>
          </table:table-cell>
        </table:table-row>
        <table:table-row>
          <table:table-cell table:style-name="Taula1.A1" office:value-type="string">
            <text:p text:style-name="Table_20_Contents">5</text:p>
          </table:table-cell>
          <table:table-cell table:style-name="Taula1.A1" office:value-type="string">
            <text:p text:style-name="Table_20_Contents">Crear la factura de proveïdor a Odoo</text:p>
          </table:table-cell>
          <table:table-cell table:style-name="Taula1.A1" office:value-type="string">
            <text:p text:style-name="Table_20_Contents"><text:span text:style-name="Strong_20_Emphasis">3-5 h</text:span></text:p>
          </table:table-cell>
        </table:table-row>
        <table:table-row>
          <table:table-cell table:style-name="Taula1.A1" office:value-type="string">
            <text:p text:style-name="Table_20_Contents">6</text:p>
          </table:table-cell>
          <table:table-cell table:style-name="Taula1.A1" office:value-type="string">
            <text:p text:style-name="Table_20_Contents">Validacions, millora UI, gestió d'errors</text:p>
          </table:table-cell>
          <table:table-cell table:style-name="Taula1.A1" office:value-type="string">
            <text:p text:style-name="Table_20_Contents"><text:span text:style-name="Strong_20_Emphasis">3-4 h</text:span></text:p>
          </table:table-cell>
        </table:table-row>
        <table:table-row>
          <table:table-cell table:style-name="Taula1.A1" office:value-type="string">
            <text:p text:style-name="Table_20_Contents">7</text:p>
          </table:table-cell>
          <table:table-cell table:style-name="Taula1.A1" office:value-type="string">
            <text:p text:style-name="Table_20_Contents">README, captures, vídeo, GitHub</text:p>
          </table:table-cell>
          <table:table-cell table:style-name="Taula1.A1" office:value-type="string">
            <text:p text:style-name="Table_20_Contents"><text:span text:style-name="Strong_20_Emphasis">2-3 h</text:span></text:p>
          </table:table-cell>
        </table:table-row>
      </table:table>
      <text:h text:style-name="Heading_20_3" text:outline-level="3">Total</text:h>
      <text:p text:style-name="Text_20_body"><text:span text:style-name="Strong_20_Emphasis">20-30 hores</text:span> aproximadament.</text:p>
      <text:h text:style-name="P7" text:outline-level="2">Resum</text:h>
      <text:p text:style-name="Text_20_body"><text:span text:style-name="T2">Hem començat el projecte </text:span><text:span text:style-name="Strong_20_Emphasis"><text:span text:style-name="Source_20_Text"><text:span text:style-name="T2">odoo-ai-vendor-bill-import</text:span></text:span></text:span><text:span text:style-name="T2"> seguint una metodologia més professional:</text:span></text:p>
      <text:list text:style-name="L10">
        <text:list-item>
          <text:p text:style-name="P33"><text:span text:style-name="T2">Repositori Git des del primer dia (</text:span><text:span text:style-name="Source_20_Text"><text:span text:style-name="T2">main</text:span></text:span><text:span text:style-name="T2">). </text:span></text:p>
        </text:list-item>
        <text:list-item>
          <text:p text:style-name="P36">Estructura del projecte (addons, ai, tests, docs...). </text:p>
        </text:list-item>
        <text:list-item>
          <text:p text:style-name="P36">Mòdul Odoo instal·lable amb model, vistes, menú i permisos. </text:p>
        </text:list-item>
        <text:list-item>
          <text:p text:style-name="P33"><text:span text:style-name="T2">Possibilitat de pujar un PDF i marcar-lo com a </text:span><text:span text:style-name="Emphasis"><text:span text:style-name="T2">Uploaded</text:span></text:span><text:span text:style-name="T2">. </text:span></text:p>
        </text:list-item>
        <text:list-item>
          <text:p text:style-name="P33"><text:span text:style-name="T2">Camp </text:span><text:span text:style-name="Source_20_Text"><text:span text:style-name="T2">extracted_text</text:span></text:span><text:span text:style-name="T2"> i botó </text:span><text:span text:style-name="Strong_20_Emphasis"><text:span text:style-name="T2">Extract Text</text:span></text:span><text:span text:style-name="T2"> (de moment amb text fictici per validar el flux). </text:span></text:p>
        </text:list-item>
        <text:list-item>
          <text:p text:style-name="P36">Hem introduït Git com a part del desenvolupament (commits petits i coherents). </text:p>
        </text:list-item>
        <text:list-item>
          <text:p text:style-name="P33"><text:span text:style-name="T2">Hem creat una carpeta </text:span><text:span text:style-name="Source_20_Text"><text:span text:style-name="T2">tests/</text:span></text:span><text:span text:style-name="T2"> per provar tecnologies abans d'integrar-les a Odoo. </text:span></text:p>
        </text:list-item>
        <text:list-item>
          <text:p text:style-name="P36">Hem provat dues estratègies: </text:p>
          <text:list>
            <text:list-item>
              <text:p text:style-name="P33"><text:span text:style-name="Strong_20_Emphasis"><text:span text:style-name="T2">PyMuPDF</text:span></text:span><text:span text:style-name="T2"> per llegir PDFs que ja contenen text. </text:span></text:p>
            </text:list-item>
            <text:list-item>
              <text:p text:style-name="P33"><text:span text:style-name="Strong_20_Emphasis"><text:span text:style-name="T2">pdf2image + Tesseract</text:span></text:span><text:span text:style-name="T2"> per PDFs escanejats. </text:span></text:p>
            </text:list-item>
          </text:list>
        </text:list-item>
        <text:list-item>
          <text:p text:style-name="P37">Hem decidit que l'aplicació detectarà automàticament quin mètode utilitzar. </text:p>
        </text:list-item>
      </text:list>
      <text:h text:style-name="P8" text:outline-level="2">Arquitectura prevista</text:h>
      <text:section text:style-name="Sect1" text:name="Secció2">
        <text:p text:style-name="P1"><text:bookmark text:name="Còpia de code-block-viewer 1"/><text:span text:style-name="Source_20_Text"><text:span text:style-name="T2">PDF</text:span></text:span></text:p>
        <text:p text:style-name="Preformatted_20_Text"><text:span text:style-name="Source_20_Text"><text:span text:style-name="T2"><text:s/>│</text:span></text:span></text:p>
        <text:p text:style-name="Preformatted_20_Text"><text:span text:style-name="Source_20_Text"><text:span text:style-name="T2"><text:s/>├── Té text → PyMuPDF</text:span></text:span></text:p>
        <text:p text:style-name="Preformatted_20_Text"><text:span text:style-name="Source_20_Text"><text:span text:style-name="T2"><text:s/>│</text:span></text:span></text:p>
        <text:p text:style-name="Preformatted_20_Text"><text:span text:style-name="Source_20_Text"><text:span text:style-name="T2"><text:s/>└── Escanejat → OCR</text:span></text:span></text:p>
        <text:p text:style-name="Preformatted_20_Text"><text:span text:style-name="Source_20_Text"><text:span text:style-name="T2"><text:s text:c="8"/>│</text:span></text:span></text:p>
        <text:p text:style-name="Preformatted_20_Text"><text:span text:style-name="Source_20_Text"><text:span text:style-name="T2"><text:s text:c="8"/>▼</text:span></text:span></text:p>
        <text:p text:style-name="Preformatted_20_Text"><text:span text:style-name="Source_20_Text"><text:span text:style-name="T2"><text:s text:c="5"/>Text extret</text:span></text:span></text:p>
        <text:p text:style-name="Preformatted_20_Text"><text:soft-page-break/><text:span text:style-name="Source_20_Text"><text:span text:style-name="T2"><text:s text:c="8"/>│</text:span></text:span></text:p>
        <text:p text:style-name="Preformatted_20_Text"><text:span text:style-name="Source_20_Text"><text:span text:style-name="T2"><text:s text:c="8"/>▼</text:span></text:span></text:p>
        <text:p text:style-name="Preformatted_20_Text"><text:span text:style-name="Source_20_Text"><text:span text:style-name="T2"><text:s text:c="8"/>IA</text:span></text:span></text:p>
        <text:p text:style-name="Preformatted_20_Text"><text:span text:style-name="Source_20_Text"><text:span text:style-name="T2"><text:s text:c="8"/>│</text:span></text:span></text:p>
        <text:p text:style-name="Preformatted_20_Text"><text:span text:style-name="Source_20_Text"><text:span text:style-name="T2"><text:s text:c="8"/>▼</text:span></text:span></text:p>
        <text:p text:style-name="Preformatted_20_Text"><text:span text:style-name="Source_20_Text"><text:span text:style-name="T2">JSON amb:</text:span></text:span></text:p>
        <text:p text:style-name="Preformatted_20_Text"><text:span text:style-name="Source_20_Text"><text:span text:style-name="T2">- proveïdor</text:span></text:span></text:p>
        <text:p text:style-name="Preformatted_20_Text"><text:span text:style-name="Source_20_Text"><text:span text:style-name="T2">- número de factura</text:span></text:span></text:p>
        <text:p text:style-name="Preformatted_20_Text"><text:span text:style-name="Source_20_Text"><text:span text:style-name="T2">- data</text:span></text:span></text:p>
        <text:p text:style-name="Preformatted_20_Text"><text:span text:style-name="Source_20_Text"><text:span text:style-name="T2">- imports</text:span></text:span></text:p>
        <text:p text:style-name="Preformatted_20_Text"><text:span text:style-name="Source_20_Text"><text:span text:style-name="T2">- IVA</text:span></text:span></text:p>
        <text:p text:style-name="Preformatted_20_Text"><text:span text:style-name="Source_20_Text"><text:span text:style-name="T2"><text:s text:c="8"/>│</text:span></text:span></text:p>
        <text:p text:style-name="Preformatted_20_Text"><text:span text:style-name="Source_20_Text"><text:span text:style-name="T2"><text:s text:c="8"/>▼</text:span></text:span></text:p>
        <text:p text:style-name="P3"><text:span text:style-name="Source_20_Text"><text:span text:style-name="T2">Crear Vendor Bill a Odoo</text:span></text:span></text:p>
      </text:section>
      <text:h text:style-name="P8" text:outline-level="2">Següent pas</text:h>
      <text:list text:style-name="L11">
        <text:list-item>
          <text:p text:style-name="P35"><text:span text:style-name="T2">Acabar el prototip OCR a </text:span><text:span text:style-name="Source_20_Text"><text:span text:style-name="T2">tests/</text:span></text:span><text:span text:style-name="T2">. </text:span></text:p>
        </text:list-item>
        <text:list-item>
          <text:p text:style-name="P35"><text:span text:style-name="T2">Crear </text:span><text:span text:style-name="Source_20_Text"><text:span text:style-name="T2">ai/pdf_extractor.py</text:span></text:span><text:span text:style-name="T2"> reutilitzable. </text:span></text:p>
        </text:list-item>
        <text:list-item>
          <text:p text:style-name="P35"><text:span text:style-name="T2">Integrar-lo amb el botó </text:span><text:span text:style-name="Strong_20_Emphasis"><text:span text:style-name="T2">Extract Text</text:span></text:span><text:span text:style-name="T2"> d'Odoo. </text:span></text:p>
        </text:list-item>
        <text:list-item>
          <text:p text:style-name="P38">Quan el text aparegui a Odoo, integrar la IA perquè retorni les dades estructurades. </text:p>
        </text:list-item>
        <text:list-item>
          <text:p text:style-name="P34"><text:span text:style-name="T2">Finalment, crear automàticament la factura de proveïdor (</text:span><text:span text:style-name="Source_20_Text"><text:span text:style-name="T2">account.move</text:span></text:span><text:span text:style-name="T2">) i preparar README, captures i vídeo per publicar el projecte a GitHub.</text:span></text:p>
        </text:list-item>
      </text:list>
      <text:p text:style-name="P14">---------------------------</text:p>
      <text:p text:style-name="P14"/>
      <text:h text:style-name="P7" text:outline-level="2">Les funcionalitats que jo faria, per ordre</text:h>
      <text:h text:style-name="P9" text:outline-level="3">Sprint 1 (1-2 h)</text:h>
      <text:list text:style-name="L12">
        <text:list-item>
          <text:p text:style-name="P39">✅ Menú </text:p>
        </text:list-item>
        <text:list-item>
          <text:p text:style-name="P39">✅ Editar dispositius </text:p>
        </text:list-item>
        <text:list-item>
          <text:p text:style-name="P39">✅ Friendly name </text:p>
        </text:list-item>
        <text:list-item>
          <text:p text:style-name="P39">✅ Notes </text:p>
        </text:list-item>
        <text:list-item>
          <text:p text:style-name="P40">✅ Categories </text:p>
        </text:list-item>
      </text:list>
      <text:h text:style-name="P9" text:outline-level="3">Sprint 2</text:h>
      <text:list text:style-name="L13">
        <text:list-item>
          <text:p text:style-name="P41">⏳ Cron cada hora. </text:p>
        </text:list-item>
        <text:list-item>
          <text:p text:style-name="P41">⏳ Comparació amb l'escaneig anterior. </text:p>
        </text:list-item>
        <text:list-item>
          <text:p text:style-name="P42">⏳ Informar de dispositius nous. </text:p>
        </text:list-item>
      </text:list>
      <text:h text:style-name="P9" text:outline-level="3">Sprint 3</text:h>
      <text:list text:style-name="L14">
        <text:list-item>
          <text:p text:style-name="P43">Historial d'escanejos. </text:p>
        </text:list-item>
        <text:list-item>
          <text:p text:style-name="P43">Primera i última vegada vist. </text:p>
        </text:list-item>
        <text:list-item>
          <text:p text:style-name="P44">Temps sense aparèixer. </text:p>
        </text:list-item>
      </text:list>
      <text:h text:style-name="P9" text:outline-level="3">Sprint 4</text:h>
      <text:list text:style-name="L15">
        <text:list-item>
          <text:p text:style-name="P45">Informe HTML/PDF. </text:p>
        </text:list-item>
      </text:list>
      <text:h text:style-name="P9" text:outline-level="3">Sprint 5</text:h>
      <text:list text:style-name="L16">
        <text:list-item>
          <text:p text:style-name="P46">Alertes (Telegram, email o notificació). </text:p>
        </text:list-item>
      </text:list>
      <text:p text:style-name="P6"/>
      <text:h text:style-name="P8" text:outline-level="2">El cron</text:h>
      <text:p text:style-name="Text_20_body"><text:span text:style-name="T2">No faria que el cron executés directament </text:span><text:span text:style-name="Source_20_Text"><text:span text:style-name="T2">main.py</text:span></text:span><text:span text:style-name="T2">.</text:span></text:p>
      <text:p text:style-name="P47">Crearia un fitxer nou:</text:p>
      <text:section text:style-name="Sect1" text:name="Secció3">
        <text:p text:style-name="P1"><text:bookmark text:name="Còpia de code-block-viewer 2"/><text:span text:style-name="Source_20_Text"><text:span text:style-name="T2">src/</text:span></text:span></text:p>
        <text:p text:style-name="Preformatted_20_Text"><text:span text:style-name="Source_20_Text"><text:span text:style-name="T2"><text:s text:c="4"/>main.py</text:span></text:span></text:p>
        <text:p text:style-name="P3"><text:span text:style-name="Source_20_Text"><text:span text:style-name="T2"><text:s text:c="4"/>scan_job.py</text:span></text:span></text:p>
      </text:section>
      <text:p text:style-name="Text_20_body"><text:span text:style-name="Source_20_Text"><text:span text:style-name="T2">scan_job.py</text:span></text:span><text:span text:style-name="T2"> faria l'escaneig </text:span><text:span text:style-name="Strong_20_Emphasis"><text:span text:style-name="T2">sense preguntar res</text:span></text:span><text:span text:style-name="T2">.</text:span></text:p>
      <text:p text:style-name="P47"><text:soft-page-break/>El cron executaria:</text:p>
      <text:section text:style-name="Sect1" text:name="Secció4">
        <text:p text:style-name="P2"><text:bookmark text:name="Còpia de code-block-viewer 3"/><text:span text:style-name="Source_20_Text"><text:span text:style-name="T2">0 * * * * /home/jor/projectes/home-network-sentinel/venv/bin/python scan_job.py</text:span></text:span></text:p>
      </text:section>
      <text:p text:style-name="Text_20_body"><text:span text:style-name="T2">I </text:span><text:span text:style-name="Source_20_Text"><text:span text:style-name="T2">main.py</text:span></text:span><text:span text:style-name="T2"> continuaria sent l'aplicació interactiva.</text:span></text:p>
      <text:p text:style-name="Text_20_body"><text:span text:style-name="Strong_20_Emphasis"><text:span text:style-name="T2">És una separació molt neta</text:span></text:span><text:span text:style-name="T2">:</text:span></text:p>
      <text:list text:style-name="L17">
        <text:list-item>
          <text:p text:style-name="P49"><text:span text:style-name="Source_20_Text"><text:span text:style-name="T2">main.py</text:span></text:span><text:span text:style-name="T2"> → usuari. </text:span></text:p>
        </text:list-item>
        <text:list-item>
          <text:p text:style-name="P48"><text:span text:style-name="Source_20_Text"><text:span text:style-name="T2">scan_job.py</text:span></text:span><text:span text:style-name="T2"> → automatització. </text:span></text:p>
        </text:list-item>
      </text:list>
      <text:p text:style-name="P47">Així podràs reutilitzar el mateix motor d'escaneig tant manualment com automàticament, que és una arquitectura molt habitual en aplicacions professionals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8T02:01:16.251504227</meta:creation-date>
    <dc:date>2026-06-22T02:03:52.994383217</dc:date>
    <meta:editing-duration>PT3H30M21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5" meta:paragraph-count="177" meta:word-count="866" meta:character-count="5301" meta:non-whitespace-character-count="4512"/>
  </office:meta>
</office:document-meta>
</file>